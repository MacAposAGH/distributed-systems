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29a40" officeooo:paragraph-rsid="00129a40"/>
    </style:style>
    <style:style style:name="P2" style:family="paragraph" style:parent-style-name="Standard">
      <style:text-properties officeooo:rsid="001368c5" officeooo:paragraph-rsid="001368c5"/>
    </style:style>
    <style:style style:name="P3" style:family="paragraph" style:parent-style-name="Standard">
      <style:text-properties officeooo:rsid="00147185" officeooo:paragraph-rsid="00147185"/>
    </style:style>
    <style:style style:name="P4" style:family="paragraph" style:parent-style-name="Standard">
      <style:text-properties officeooo:rsid="00173413" officeooo:paragraph-rsid="00173413"/>
    </style:style>
    <style:style style:name="T1" style:family="text">
      <style:text-properties officeooo:rsid="0015e4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o1 – karta sieciowa</text:p>
      <text:p text:style-name="P1">inet</text:p>
      <text:p text:style-name="P1">netmask – które hosty są w naszej sieci, a które nie</text:p>
      <text:p text:style-name="P1">broadcast </text:p>
      <text:p text:style-name="P1">gateway – brama musi być przy komunikacji między innymi sieciami</text:p>
      <text:p text:style-name="P1"/>
      <text:p text:style-name="P2">gniazdo = protokół (TCP) + ip + port <text:span text:style-name="T1">(80 – http)</text:span></text:p>
      <text:p text:style-name="P2"/>
      <text:p text:style-name="P2">TCP – połączeniowy, najpierw połączenie potem transfer</text:p>
      <text:p text:style-name="P2">UDP – niepołączeniowy</text:p>
      <text:p text:style-name="P3">QUIC – http 3</text:p>
      <text:p text:style-name="P3"/>
      <text:p text:style-name="P3">DNS – transfer domeny na ip</text:p>
      <text:p text:style-name="P3"/>
      <text:p text:style-name="P4">wireshar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6T13:02:13.660493339</meta:creation-date>
    <dc:date>2026-04-26T15:59:03.062732580</dc:date>
    <meta:editing-duration>PT1H40M33S</meta:editing-duration>
    <meta:editing-cycles>4</meta:editing-cycles>
    <meta:generator>LibreOffice/25.2.6.2$Linux_X86_64 LibreOffice_project/520$Build-2</meta:generator>
    <meta:document-statistic meta:table-count="0" meta:image-count="0" meta:object-count="0" meta:page-count="1" meta:paragraph-count="11" meta:word-count="51" meta:character-count="323" meta:non-whitespace-character-count="274"/>
  </office:meta>
</office:document-meta>
</file>