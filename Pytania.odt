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320" officeooo:paragraph-rsid="00056320"/>
    </style:style>
    <style:style style:name="P2" style:family="paragraph" style:parent-style-name="Standard">
      <style:text-properties officeooo:rsid="000a7bb2" officeooo:paragraph-rsid="000a7bb2"/>
    </style:style>
    <style:style style:name="P3" style:family="paragraph" style:parent-style-name="Standard">
      <style:text-properties officeooo:rsid="000c34fd" officeooo:paragraph-rsid="000c34fd"/>
    </style:style>
    <style:style style:name="P4" style:family="paragraph" style:parent-style-name="Standard">
      <style:text-properties officeooo:rsid="000d3a6e" officeooo:paragraph-rsid="000d3a6e"/>
    </style:style>
    <style:style style:name="P5" style:family="paragraph" style:parent-style-name="Standard">
      <style:text-properties fo:font-weight="normal" officeooo:rsid="0015b038" officeooo:paragraph-rsid="0015b038" style:font-weight-asian="normal" style:font-weight-complex="normal"/>
    </style:style>
    <style:style style:name="P6" style:family="paragraph" style:parent-style-name="Standard">
      <style:text-properties fo:font-weight="normal" officeooo:rsid="0017a29f" officeooo:paragraph-rsid="0017a29f" style:font-weight-asian="normal" style:font-weight-complex="normal"/>
    </style:style>
    <style:style style:name="P7" style:family="paragraph" style:parent-style-name="Standard">
      <style:text-properties officeooo:paragraph-rsid="00170302"/>
    </style:style>
    <style:style style:name="P8" style:family="paragraph" style:parent-style-name="Standard">
      <style:text-properties fo:font-weight="bold" officeooo:rsid="00113930" officeooo:paragraph-rsid="00113930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0a7bb2" officeooo:paragraph-rsid="000a7bb2" style:font-weight-asian="bold" style:font-weight-complex="bold"/>
    </style:style>
    <style:style style:name="P11" style:family="paragraph" style:parent-style-name="Standard">
      <style:text-properties fo:font-weight="bold" officeooo:rsid="0015b038" officeooo:paragraph-rsid="0015b038" style:font-weight-asian="bold" style:font-weight-complex="bold"/>
    </style:style>
    <style:style style:name="P12" style:family="paragraph" style:parent-style-name="Standard">
      <style:text-properties fo:font-weight="bold" officeooo:rsid="0017a29f" officeooo:paragraph-rsid="0017a29f" style:font-weight-asian="bold" style:font-weight-complex="bold"/>
    </style:style>
    <style:style style:name="P13" style:family="paragraph" style:parent-style-name="Standard">
      <style:text-properties fo:font-weight="bold" officeooo:rsid="00213274" officeooo:paragraph-rsid="00213274" style:font-weight-asian="bold" style:font-weight-complex="bold"/>
    </style:style>
    <style:style style:name="P14" style:family="paragraph" style:parent-style-name="Standard">
      <style:text-properties officeooo:rsid="000c34fd" officeooo:paragraph-rsid="000d3a6e"/>
    </style:style>
    <style:style style:name="P15" style:family="paragraph" style:parent-style-name="Standard">
      <style:text-properties fo:font-weight="bold" officeooo:rsid="0006a9a6" officeooo:paragraph-rsid="0006a9a6" style:font-weight-asian="bold" style:font-weight-complex="bold"/>
    </style:style>
    <style:style style:name="P16" style:family="paragraph" style:parent-style-name="Standard">
      <style:text-properties fo:font-weight="bold" officeooo:rsid="0013dbc7" officeooo:paragraph-rsid="0013dbc7" style:font-weight-asian="bold" style:font-weight-complex="bold"/>
    </style:style>
    <style:style style:name="P17" style:family="paragraph" style:parent-style-name="Standard">
      <style:text-properties fo:font-weight="bold" officeooo:rsid="00213274" officeooo:paragraph-rsid="00225488" style:font-weight-asian="bold" style:font-weight-complex="bold"/>
    </style:style>
    <style:style style:name="P18" style:family="paragraph" style:parent-style-name="Standard">
      <style:text-properties fo:font-weight="bold" officeooo:rsid="002c8f11" officeooo:paragraph-rsid="002c8f11" style:font-weight-asian="bold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rsid="00056320" officeooo:paragraph-rsid="0006a9a6"/>
    </style:style>
    <style:style style:name="P21" style:family="paragraph" style:parent-style-name="Standard" style:list-style-name="L1">
      <style:text-properties officeooo:rsid="00056320" officeooo:paragraph-rsid="00056320"/>
    </style:style>
    <style:style style:name="P22" style:family="paragraph" style:parent-style-name="Standard" style:list-style-name="L1">
      <style:text-properties officeooo:rsid="00079c94" officeooo:paragraph-rsid="00079c94"/>
    </style:style>
    <style:style style:name="P23" style:family="paragraph" style:parent-style-name="Standard" style:list-style-name="L1">
      <style:text-properties officeooo:rsid="00090ecc" officeooo:paragraph-rsid="00090ecc"/>
    </style:style>
    <style:style style:name="P24" style:family="paragraph" style:parent-style-name="Standard" style:list-style-name="L1">
      <style:text-properties officeooo:rsid="00099b1f" officeooo:paragraph-rsid="00099b1f"/>
    </style:style>
    <style:style style:name="P25" style:family="paragraph" style:parent-style-name="Standard">
      <style:text-properties fo:font-weight="normal" officeooo:rsid="00213274" officeooo:paragraph-rsid="00213274" style:font-weight-asian="normal" style:font-weight-complex="normal"/>
    </style:style>
    <style:style style:name="P26" style:family="paragraph" style:parent-style-name="Standard">
      <style:text-properties fo:font-weight="normal" officeooo:rsid="002c8f11" officeooo:paragraph-rsid="002c8f11" style:font-weight-asian="normal" style:font-weight-complex="normal"/>
    </style:style>
    <style:style style:name="T1" style:family="text">
      <style:text-properties officeooo:rsid="0006a9a6"/>
    </style:style>
    <style:style style:name="T2" style:family="text">
      <style:text-properties officeooo:rsid="00090e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21b" style:font-style-asian="italic" style:font-style-complex="italic"/>
    </style:style>
    <style:style style:name="T5" style:family="text">
      <style:text-properties fo:font-style="italic" officeooo:rsid="001f8efa" style:font-style-asian="italic" style:font-style-complex="italic"/>
    </style:style>
    <style:style style:name="T6" style:family="text">
      <style:text-properties officeooo:rsid="00099b1f"/>
    </style:style>
    <style:style style:name="T7" style:family="text">
      <style:text-properties officeooo:rsid="000c34fd"/>
    </style:style>
    <style:style style:name="T8" style:family="text">
      <style:text-properties officeooo:rsid="000ca21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31452"/>
    </style:style>
    <style:style style:name="T11" style:family="text">
      <style:text-properties officeooo:rsid="0013dbc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99b1f" style:font-weight-asian="normal" style:font-weight-complex="normal"/>
    </style:style>
    <style:style style:name="T14" style:family="text">
      <style:text-properties fo:font-weight="normal" officeooo:rsid="0015b038" style:font-weight-asian="normal" style:font-weight-complex="normal"/>
    </style:style>
    <style:style style:name="T15" style:family="text">
      <style:text-properties fo:font-weight="normal" officeooo:rsid="00225488" style:font-weight-asian="normal" style:font-weight-complex="normal"/>
    </style:style>
    <style:style style:name="T16" style:family="text">
      <style:text-properties fo:font-weight="normal" officeooo:rsid="002326e4" style:font-weight-asian="normal" style:font-weight-complex="normal"/>
    </style:style>
    <style:style style:name="T17" style:family="text">
      <style:text-properties fo:font-weight="normal" officeooo:rsid="0017a29f" style:font-weight-asian="normal" style:font-weight-complex="normal"/>
    </style:style>
    <style:style style:name="T18" style:family="text">
      <style:text-properties fo:font-weight="normal" officeooo:rsid="0028ae10" style:font-weight-asian="normal" style:font-weight-complex="normal"/>
    </style:style>
    <style:style style:name="T19" style:family="text">
      <style:text-properties fo:font-weight="normal" officeooo:rsid="00131452" style:font-weight-asian="normal" style:font-weight-complex="normal"/>
    </style:style>
    <style:style style:name="T20" style:family="text">
      <style:text-properties fo:font-weight="normal" officeooo:rsid="0013dbc7" style:font-weight-asian="normal" style:font-weight-complex="normal"/>
    </style:style>
    <style:style style:name="T21" style:family="text">
      <style:text-properties officeooo:rsid="0015b038"/>
    </style:style>
    <style:style style:name="T22" style:family="text">
      <style:text-properties officeooo:rsid="00170302"/>
    </style:style>
    <style:style style:name="T23" style:family="text">
      <style:text-properties officeooo:rsid="00175261"/>
    </style:style>
    <style:style style:name="T24" style:family="text">
      <style:text-properties officeooo:rsid="0017a29f"/>
    </style:style>
    <style:style style:name="T25" style:family="text">
      <style:text-properties officeooo:rsid="001f8efa"/>
    </style:style>
    <style:style style:name="T26" style:family="text">
      <style:text-properties officeooo:rsid="00225488"/>
    </style:style>
    <style:style style:name="T27" style:family="text">
      <style:text-properties officeooo:rsid="0028ae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3. Jak skompilować plik z definicją interfejsu dla aplikacji w języku Python? A C++?</text:p>
      <text:p text:style-name="Standard"/>
      <text:p text:style-name="P9"><text:span text:style-name="T1">4. Analiza kodu źródłowego. </text:span><text:span text:style-name="T12">Co znajduje się w katalogu generated?</text:span></text:p>
      <text:p text:style-name="P2">Pliki źródłowe utworzone na podstawie <text:span text:style-name="T8">struktury</text:span> <text:span text:style-name="T7">slice-a </text:span><text:span text:style-name="T4">calculator.ice</text:span>, są to:</text:p>
      <text:p text:style-name="P2">interfejs Calc – definiuje metody aplikacji</text:p>
      <text:p text:style-name="P2">klasa A – inicjalizuje obiekty na których wywoływane są metody interfejsu Calc </text:p>
      <text:p text:style-name="P3">CalcPrx – klasa rozszerzająca obiekt <text:s/><text:span text:style-name="T2">ObjectPrx</text:span></text:p>
      <text:p text:style-name="P3">NoInput – klasa wyjątku rzucanego gdy użytkownik nie poda <text:span text:style-name="T8">parametrów operacji</text:span></text:p>
      <text:p text:style-name="P4">operation – enumerator operacji</text:p>
      <text:p text:style-name="P14">_CalcPrx</text:p>
      <text:p text:style-name="P10">6. Uruchom<text:span text:style-name="T10">ienie</text:span> serwer<text:span text:style-name="T10">a. </text:span><text:span text:style-name="T19">J</text:span><text:span text:style-name="T12">akiego gniazda </text:span><text:span text:style-name="T20">używa</text:span><text:span text:style-name="T12">? Jakim poleceniem systemowym można sprawdzić jakie gniazda są powiązane z danym procesem?</text:span></text:p>
      <text:p text:style-name="P1"/>
      <text:p text:style-name="P15">8.</text:p>
      <text:list xml:id="list2863106116" text:style-name="L1">
        <text:list-item>
          <text:p text:style-name="P20">Ile sztuk obiektów obecnie udostępnia klientom serwer?</text:p>
        </text:list-item>
        <text:list-item>
          <text:p text:style-name="P19">Jak nazywają się te obiekty?</text:p>
          <text:p text:style-name="P22">2 – calc11, calc22</text:p>
        </text:list-item>
        <text:list-item>
          <text:p text:style-name="P19">Ile wpisów zawiera tablica ASM (Active Servant Map) serwera?</text:p>
          <text:p text:style-name="P22">2 – po jednym na <text:span text:style-name="T2">każdego serwanta</text:span></text:p>
        </text:list-item>
        <text:list-item>
          <text:p text:style-name="P21">Jak nazywa się obiekt używany obecnie przez klienta?</text:p>
        </text:list-item>
        <text:list-item>
          <text:p text:style-name="P21">W jaki sposób klient uzyskał referencję do tego konkretnego obiektu (tj. co zawiera referencja)?</text:p>
          <text:p text:style-name="P23"><text:span text:style-name="T3">obj1</text:span> – aplikacja daje 2 możliwości uzyskania referencji do obiektu ObjectPrx – prze<text:span text:style-name="T6">z: konwersję właściwości pliku konfiguracyjnego </text:span><text:span text:style-name="T21">klienta </text:span><text:span text:style-name="T6">do proxy lub konwersję ciągu zanków do proxy. Bez podania początkowych argumentów aplikacja wykorzystuję drugą opcję.</text:span></text:p>
        </text:list-item>
        <text:list-item>
          <text:p text:style-name="P21">Co się stanie jeśli klient zrealizuje wywołanie na obiekcie calc33 (przetestuj)</text:p>
          <text:p text:style-name="P24">Rzucany jest wyjątek com.zeroc.Ice.ObjectNotExistException, ponieważ serwer nie udostępnia takiego obiektu.</text:p>
        </text:list-item>
      </text:list>
      <text:p text:style-name="P16">9. Analiza komunikacji sieciowej. <text:span text:style-name="T18">J</text:span><text:span text:style-name="T12">akie informacje zawiera żądanie, a jakie odpowiedź?</text:span></text:p>
      <text:p text:style-name="P5"/>
      <text:p text:style-name="P11">10. Rozproszenie. <text:span text:style-name="T12">Co trzeba zmienić w kodzie/konfiguracji klienta i/lub serwera, by klient mógł się </text:span><text:span text:style-name="T17">\ </text:span><text:span text:style-name="T12">komunikować z serwerem działającym na innej maszynie?</text:span></text:p>
      <text:p text:style-name="P7"><text:span text:style-name="T22">Przy tworzeniu ObjectPrx </text:span><text:span text:style-name="T23">w kodzie klienta </text:span><text:span text:style-name="T22">należy zmienić adres IP proxy z adresu IP loopback (</text:span>127.0.0.2<text:span text:style-name="T22">)</text:span> <text:span text:style-name="T22">na adres IP maszyny, na której działa serwer. </text:span><text:span text:style-name="T23">Adres IP można też zmienić w </text:span><text:span text:style-name="T13">pliku </text:span><text:span text:style-name="T14">konfiguracyjnym</text:span><text:span text:style-name="T13"> </text:span><text:span text:style-name="T14">klienta.</text:span></text:p>
      <text:p text:style-name="P12">11. Rozbudowa interfejsu. <text:span text:style-name="T12">Do jakiego typu w języku Java odwzorowuje się sekwencja liczb long?</text:span></text:p>
      <text:p text:style-name="P6">sekwencja liczb long <text:span text:style-name="T25">w ICE odwzorowuje się do tablicy typów prymitywnych </text:span><text:span text:style-name="T5">long</text:span><text:span text:style-name="T25"> w Javie.</text:span></text:p>
      <text:p text:style-name="P13">1<text:span text:style-name="T26">3</text:span>. Wywołania asynchroniczne. <text:span text:style-name="T12">Prześledź działanie istniejących, wzorcowych wywołań add-</text:span></text:p>
      <text:p text:style-name="P25">asyn1 oraz add-asyn2-req i add-asyn2-res. W jakich przypadkach warto w taki sposób</text:p>
      <text:p text:style-name="P25">realizować wywołania zdalne?</text:p>
      <text:p text:style-name="P13"><text:span text:style-name="T26">14. Pula wątków adaptera.</text:span><text:span text:style-name="T15"> Domyślna wielkość puli wątków adaptera wynosi 1 (spróbuj przetestować, np. uruchamiając kolejną instancję klienta i wywołując długotrwałą operację) – kiedy to może stanowić problem? </text:span></text:p>
      <text:p text:style-name="P17"><text:span text:style-name="T12">Jaką wielkość puli wątków skonfigurowano </text:span><text:span text:style-name="T16">w pliku konfiguracyjnym serwera</text:span><text:span text:style-name="T12">?</text:span></text:p>
      <text:p text:style-name="P18">15. Efektywność komunikacji – wywołania oneway. <text:span text:style-name="T12">Na czym polega wywołanie oneway?</text:span></text:p>
      <text:p text:style-name="P18"><text:span text:style-name="T12">Jakie są wymogi dla takiej realizacji?</text:span></text:p>
      <text:p text:style-name="P26">Które z operacji interfejsu Calculator mogą być tak zrealizowane?</text:p>
      <text:p text:style-name="P26">Na czym polega różnica w komunikacji sieciowej (dialog klienta z serwerem) w stosunku do tradycyjnego wywołania (tj. twoway)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7T12:53:50.424725384</meta:creation-date>
    <dc:date>2026-06-27T14:48:40.746799057</dc:date>
    <meta:editing-duration>PT1H1M7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400" meta:character-count="2859" meta:non-whitespace-character-count="2490"/>
  </office:meta>
</office:document-meta>
</file>