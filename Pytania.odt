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320" officeooo:paragraph-rsid="00056320"/>
    </style:style>
    <style:style style:name="P2" style:family="paragraph" style:parent-style-name="Standard">
      <style:text-properties officeooo:rsid="000a7bb2" officeooo:paragraph-rsid="000a7bb2"/>
    </style:style>
    <style:style style:name="P3" style:family="paragraph" style:parent-style-name="Standard">
      <style:text-properties officeooo:rsid="000c34fd" officeooo:paragraph-rsid="000c34fd"/>
    </style:style>
    <style:style style:name="P4" style:family="paragraph" style:parent-style-name="Standard">
      <style:text-properties officeooo:rsid="000c34fd" officeooo:paragraph-rsid="000d3a6e"/>
    </style:style>
    <style:style style:name="P5" style:family="paragraph" style:parent-style-name="Standard">
      <style:text-properties officeooo:rsid="000d3a6e" officeooo:paragraph-rsid="000d3a6e"/>
    </style:style>
    <style:style style:name="P6" style:family="paragraph" style:parent-style-name="Standard">
      <style:text-properties fo:font-weight="normal" officeooo:rsid="0015b038" officeooo:paragraph-rsid="0015b038" style:font-weight-asian="normal" style:font-weight-complex="normal"/>
    </style:style>
    <style:style style:name="P7" style:family="paragraph" style:parent-style-name="Standard">
      <style:text-properties fo:font-weight="normal" officeooo:rsid="0017a29f" officeooo:paragraph-rsid="0017a29f" style:font-weight-asian="normal" style:font-weight-complex="normal"/>
    </style:style>
    <style:style style:name="P8" style:family="paragraph" style:parent-style-name="Standard">
      <style:text-properties fo:font-weight="normal" officeooo:rsid="00213274" officeooo:paragraph-rsid="00213274" style:font-weight-asian="normal" style:font-weight-complex="normal"/>
    </style:style>
    <style:style style:name="P9" style:family="paragraph" style:parent-style-name="Standard">
      <style:text-properties fo:font-weight="normal" officeooo:rsid="002c8f11" officeooo:paragraph-rsid="00387974" style:font-weight-asian="normal" style:font-weight-complex="normal"/>
    </style:style>
    <style:style style:name="P10" style:family="paragraph" style:parent-style-name="Standard">
      <style:text-properties fo:font-weight="normal" officeooo:rsid="002f900d" officeooo:paragraph-rsid="002f900d" style:font-weight-asian="normal" style:font-weight-complex="normal"/>
    </style:style>
    <style:style style:name="P11" style:family="paragraph" style:parent-style-name="Standard">
      <style:text-properties fo:font-weight="normal" officeooo:rsid="00314b99" officeooo:paragraph-rsid="00314b99" style:font-weight-asian="normal" style:font-weight-complex="normal"/>
    </style:style>
    <style:style style:name="P12" style:family="paragraph" style:parent-style-name="Standard">
      <style:text-properties fo:font-weight="normal" officeooo:rsid="003a566e" officeooo:paragraph-rsid="003a566e" style:font-weight-asian="normal" style:font-weight-complex="normal"/>
    </style:style>
    <style:style style:name="P13" style:family="paragraph" style:parent-style-name="Standard">
      <style:text-properties fo:font-weight="bold" officeooo:rsid="00113930" officeooo:paragraph-rsid="00113930" style:font-weight-asian="bold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0a7bb2" officeooo:paragraph-rsid="000a7bb2" style:font-weight-asian="bold" style:font-weight-complex="bold"/>
    </style:style>
    <style:style style:name="P16" style:family="paragraph" style:parent-style-name="Standard">
      <style:text-properties fo:font-weight="bold" officeooo:rsid="0015b038" officeooo:paragraph-rsid="0015b038" style:font-weight-asian="bold" style:font-weight-complex="bold"/>
    </style:style>
    <style:style style:name="P17" style:family="paragraph" style:parent-style-name="Standard">
      <style:text-properties fo:font-weight="bold" officeooo:rsid="0017a29f" officeooo:paragraph-rsid="0017a29f" style:font-weight-asian="bold" style:font-weight-complex="bold"/>
    </style:style>
    <style:style style:name="P18" style:family="paragraph" style:parent-style-name="Standard">
      <style:text-properties fo:font-weight="bold" officeooo:rsid="00213274" officeooo:paragraph-rsid="00213274" style:font-weight-asian="bold" style:font-weight-complex="bold"/>
    </style:style>
    <style:style style:name="P19" style:family="paragraph" style:parent-style-name="Standard">
      <style:text-properties fo:font-weight="bold" officeooo:rsid="00213274" officeooo:paragraph-rsid="00225488" style:font-weight-asian="bold" style:font-weight-complex="bold"/>
    </style:style>
    <style:style style:name="P20" style:family="paragraph" style:parent-style-name="Standard">
      <style:text-properties fo:font-weight="bold" officeooo:rsid="0006a9a6" officeooo:paragraph-rsid="0006a9a6" style:font-weight-asian="bold" style:font-weight-complex="bold"/>
    </style:style>
    <style:style style:name="P21" style:family="paragraph" style:parent-style-name="Standard">
      <style:text-properties fo:font-weight="bold" officeooo:rsid="0013dbc7" officeooo:paragraph-rsid="0013dbc7" style:font-weight-asian="bold" style:font-weight-complex="bold"/>
    </style:style>
    <style:style style:name="P22" style:family="paragraph" style:parent-style-name="Standard">
      <style:text-properties fo:font-weight="bold" officeooo:rsid="002c8f11" officeooo:paragraph-rsid="00387974" style:font-weight-asian="bold" style:font-weight-complex="bold"/>
    </style:style>
    <style:style style:name="P23" style:family="paragraph" style:parent-style-name="Standard">
      <style:text-properties fo:font-weight="bold" officeooo:rsid="002c8f11" officeooo:paragraph-rsid="002c8f11" style:font-weight-asian="bold" style:font-weight-complex="bold"/>
    </style:style>
    <style:style style:name="P24" style:family="paragraph" style:parent-style-name="Standard">
      <style:text-properties officeooo:paragraph-rsid="002dda8c"/>
    </style:style>
    <style:style style:name="P25" style:family="paragraph" style:parent-style-name="Standard">
      <style:text-properties officeooo:paragraph-rsid="003f930c"/>
    </style:style>
    <style:style style:name="P26" style:family="paragraph" style:parent-style-name="Standard">
      <style:text-properties officeooo:rsid="003f930c" officeooo:paragraph-rsid="003f930c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rsid="00056320" officeooo:paragraph-rsid="0006a9a6"/>
    </style:style>
    <style:style style:name="P29" style:family="paragraph" style:parent-style-name="Standard" style:list-style-name="L1">
      <style:text-properties officeooo:rsid="00056320" officeooo:paragraph-rsid="00056320"/>
    </style:style>
    <style:style style:name="P30" style:family="paragraph" style:parent-style-name="Standard" style:list-style-name="L1">
      <style:text-properties officeooo:rsid="00079c94" officeooo:paragraph-rsid="00079c94"/>
    </style:style>
    <style:style style:name="P31" style:family="paragraph" style:parent-style-name="Standard" style:list-style-name="L1">
      <style:text-properties officeooo:rsid="00090ecc" officeooo:paragraph-rsid="00090ecc"/>
    </style:style>
    <style:style style:name="P32" style:family="paragraph" style:parent-style-name="Standard" style:list-style-name="L1">
      <style:text-properties officeooo:rsid="00099b1f" officeooo:paragraph-rsid="00099b1f"/>
    </style:style>
    <style:style style:name="P33" style:family="paragraph" style:parent-style-name="Standard">
      <style:text-properties fo:font-style="normal" fo:font-weight="normal" officeooo:rsid="003a566e" officeooo:paragraph-rsid="003f930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a566e" officeooo:paragraph-rsid="003a566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a566e" officeooo:paragraph-rsid="00440d5b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a566e" officeooo:paragraph-rsid="004489b1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a566e" officeooo:paragraph-rsid="00450cb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489b1" officeooo:paragraph-rsid="004489b1" style:font-style-asian="normal" style:font-weight-asian="normal" style:font-style-complex="normal" style:font-weight-complex="normal"/>
    </style:style>
    <style:style style:name="P39" style:family="paragraph" style:parent-style-name="Standard" style:list-style-name="L2">
      <style:text-properties fo:font-style="normal" fo:font-weight="normal" officeooo:rsid="00450cb8" officeooo:paragraph-rsid="00452bcc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style:text-properties fo:font-style="normal" fo:font-weight="normal" officeooo:rsid="00450cb8" officeooo:paragraph-rsid="004b0b78" style:font-style-asian="normal" style:font-weight-asian="normal" style:font-style-complex="normal" style:font-weight-complex="normal"/>
    </style:style>
    <style:style style:name="P41" style:family="paragraph" style:parent-style-name="Standard" style:list-style-name="L3">
      <style:text-properties fo:font-style="normal" fo:font-weight="normal" officeooo:rsid="00450cb8" officeooo:paragraph-rsid="00479ede" style:font-style-asian="normal" style:font-weight-asian="normal" style:font-style-complex="normal" style:font-weight-complex="normal"/>
    </style:style>
    <style:style style:name="P42" style:family="paragraph" style:parent-style-name="Standard" style:list-style-name="L2">
      <style:text-properties fo:font-style="normal" fo:font-weight="normal" officeooo:rsid="00452bcc" officeooo:paragraph-rsid="00479ede" style:font-style-asian="normal" style:font-weight-asian="normal" style:font-style-complex="normal" style:font-weight-complex="normal"/>
    </style:style>
    <style:style style:name="P43" style:family="paragraph" style:parent-style-name="Standard" style:list-style-name="L2">
      <style:text-properties fo:font-style="normal" fo:font-weight="normal" officeooo:rsid="00452bcc" officeooo:paragraph-rsid="004b0b7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52bcc" officeooo:paragraph-rsid="00479ed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weight="bold" officeooo:rsid="002c8f11" officeooo:paragraph-rsid="00387974" style:font-weight-asian="bold" style:font-weight-complex="bold"/>
    </style:style>
    <style:style style:name="P46" style:family="paragraph" style:parent-style-name="Standard">
      <style:text-properties fo:font-weight="bold" officeooo:rsid="00213274" officeooo:paragraph-rsid="00213274" style:font-weight-asian="bold" style:font-weight-complex="bold"/>
    </style:style>
    <style:style style:name="P47" style:family="paragraph" style:parent-style-name="Standard">
      <style:text-properties fo:font-weight="bold" officeooo:rsid="0017a29f" officeooo:paragraph-rsid="0017a29f" style:font-weight-asian="bold" style:font-weight-complex="bold"/>
    </style:style>
    <style:style style:name="P48" style:family="paragraph" style:parent-style-name="Standard">
      <style:text-properties fo:font-weight="bold" officeooo:rsid="0015b038" officeooo:paragraph-rsid="0015b038" style:font-weight-asian="bold" style:font-weight-complex="bold"/>
    </style:style>
    <style:style style:name="P49" style:family="paragraph" style:parent-style-name="Standard">
      <style:text-properties fo:font-weight="bold" officeooo:rsid="000a7bb2" officeooo:paragraph-rsid="000a7bb2" style:font-weight-asian="bold" style:font-weight-complex="bold"/>
    </style:style>
    <style:style style:name="P50" style:family="paragraph" style:parent-style-name="Standard">
      <style:text-properties fo:font-weight="normal" officeooo:rsid="003a566e" officeooo:paragraph-rsid="00440d5b" style:font-weight-asian="normal" style:font-weight-complex="normal"/>
    </style:style>
    <style:style style:name="P51" style:family="paragraph" style:parent-style-name="Standard">
      <style:text-properties officeooo:paragraph-rsid="00499910"/>
    </style:style>
    <style:style style:name="P52" style:family="paragraph" style:parent-style-name="Standard" style:list-style-name="L3">
      <style:text-properties officeooo:paragraph-rsid="00499910"/>
    </style:style>
    <style:style style:name="T1" style:family="text">
      <style:text-properties officeooo:rsid="0006a9a6"/>
    </style:style>
    <style:style style:name="T2" style:family="text">
      <style:text-properties officeooo:rsid="00090ec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a21b" style:font-style-asian="italic" style:font-style-complex="italic"/>
    </style:style>
    <style:style style:name="T5" style:family="text">
      <style:text-properties fo:font-style="italic" officeooo:rsid="001f8efa" style:font-style-asian="italic" style:font-style-complex="italic"/>
    </style:style>
    <style:style style:name="T6" style:family="text">
      <style:text-properties officeooo:rsid="00099b1f"/>
    </style:style>
    <style:style style:name="T7" style:family="text">
      <style:text-properties officeooo:rsid="000c34fd"/>
    </style:style>
    <style:style style:name="T8" style:family="text">
      <style:text-properties officeooo:rsid="000ca21b"/>
    </style:style>
    <style:style style:name="T9" style:family="text">
      <style:text-properties officeooo:rsid="0013145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99b1f" style:font-weight-asian="normal" style:font-weight-complex="normal"/>
    </style:style>
    <style:style style:name="T12" style:family="text">
      <style:text-properties fo:font-weight="normal" officeooo:rsid="0015b038" style:font-weight-asian="normal" style:font-weight-complex="normal"/>
    </style:style>
    <style:style style:name="T13" style:family="text">
      <style:text-properties fo:font-weight="normal" officeooo:rsid="00225488" style:font-weight-asian="normal" style:font-weight-complex="normal"/>
    </style:style>
    <style:style style:name="T14" style:family="text">
      <style:text-properties fo:font-weight="normal" officeooo:rsid="002326e4" style:font-weight-asian="normal" style:font-weight-complex="normal"/>
    </style:style>
    <style:style style:name="T15" style:family="text">
      <style:text-properties fo:font-weight="normal" officeooo:rsid="0017a29f" style:font-weight-asian="normal" style:font-weight-complex="normal"/>
    </style:style>
    <style:style style:name="T16" style:family="text">
      <style:text-properties fo:font-weight="normal" officeooo:rsid="0028ae10" style:font-weight-asian="normal" style:font-weight-complex="normal"/>
    </style:style>
    <style:style style:name="T17" style:family="text">
      <style:text-properties fo:font-weight="normal" officeooo:rsid="00131452" style:font-weight-asian="normal" style:font-weight-complex="normal"/>
    </style:style>
    <style:style style:name="T18" style:family="text">
      <style:text-properties fo:font-weight="normal" officeooo:rsid="0013dbc7" style:font-weight-asian="normal" style:font-weight-complex="normal"/>
    </style:style>
    <style:style style:name="T19" style:family="text">
      <style:text-properties fo:font-weight="normal" officeooo:rsid="002c8f11" style:font-weight-asian="normal" style:font-weight-complex="normal"/>
    </style:style>
    <style:style style:name="T20" style:family="text">
      <style:text-properties officeooo:rsid="0015b038"/>
    </style:style>
    <style:style style:name="T21" style:family="text">
      <style:text-properties officeooo:rsid="00170302"/>
    </style:style>
    <style:style style:name="T22" style:family="text">
      <style:text-properties officeooo:rsid="00175261"/>
    </style:style>
    <style:style style:name="T23" style:family="text">
      <style:text-properties officeooo:rsid="001f8efa"/>
    </style:style>
    <style:style style:name="T24" style:family="text">
      <style:text-properties officeooo:rsid="00225488"/>
    </style:style>
    <style:style style:name="T25" style:family="text">
      <style:text-properties officeooo:rsid="002dda8c"/>
    </style:style>
    <style:style style:name="T26" style:family="text">
      <style:text-properties officeooo:rsid="0033187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3ba8d7" style:font-style-asian="normal" style:font-style-complex="normal"/>
    </style:style>
    <style:style style:name="T29" style:family="text">
      <style:text-properties fo:font-style="normal" officeooo:rsid="00440d5b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566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ba8d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cbd1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e77f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0660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0d496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18b7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52bc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officeooo:rsid="003a566e" style:font-style-asian="normal" style:font-weight-asian="bold" style:font-style-complex="normal" style:font-weight-complex="bold"/>
    </style:style>
    <style:style style:name="T40" style:family="text">
      <style:text-properties officeooo:rsid="003ba8d7"/>
    </style:style>
    <style:style style:name="T41" style:family="text">
      <style:text-properties officeooo:rsid="003cbd1b"/>
    </style:style>
    <style:style style:name="T42" style:family="text">
      <style:text-properties officeooo:rsid="003e77ff"/>
    </style:style>
    <style:style style:name="T43" style:family="text">
      <style:text-properties officeooo:rsid="00450cb8"/>
    </style:style>
    <style:style style:name="T44" style:family="text">
      <style:text-properties officeooo:rsid="00452bcc"/>
    </style:style>
    <style:style style:name="T45" style:family="text">
      <style:text-properties officeooo:rsid="00464f35"/>
    </style:style>
    <style:style style:name="T46" style:family="text">
      <style:text-properties officeooo:rsid="00479ede"/>
    </style:style>
    <style:style style:name="T47" style:family="text">
      <style:text-properties officeooo:rsid="003a566e"/>
    </style:style>
    <style:style style:name="T48" style:family="text">
      <style:text-properties officeooo:rsid="004b0b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3. Jak skompilować plik z definicją interfejsu dla aplikacji w języku Python? A C++?</text:p>
      <text:p text:style-name="Standard"/>
      <text:p text:style-name="P14"><text:span text:style-name="T1">4. Analiza kodu źródłowego. </text:span><text:span text:style-name="T10">Co znajduje się w katalogu generated?</text:span></text:p>
      <text:p text:style-name="P2">Pliki źródłowe utworzone na podstawie <text:span text:style-name="T8">struktury</text:span> <text:span text:style-name="T7">slice-a </text:span><text:span text:style-name="T4">calculator.ice</text:span>, są to:</text:p>
      <text:p text:style-name="P2">interfejs Calc – definiuje metody aplikacji</text:p>
      <text:p text:style-name="P2">klasa A – inicjalizuje obiekty na których wywoływane są metody interfejsu Calc </text:p>
      <text:p text:style-name="P3">CalcPrx – klasa rozszerzająca obiekt <text:s/><text:span text:style-name="T2">ObjectPrx</text:span></text:p>
      <text:p text:style-name="P3">NoInput – klasa wyjątku rzucanego gdy użytkownik nie poda <text:span text:style-name="T8">parametrów operacji</text:span></text:p>
      <text:p text:style-name="P5">operation – enumerator operacji</text:p>
      <text:p text:style-name="P4">_CalcPrx</text:p>
      <text:p text:style-name="P15"/>
      <text:p text:style-name="P15">6. Uruchom<text:span text:style-name="T9">ienie</text:span> serwer<text:span text:style-name="T9">a. </text:span><text:span text:style-name="T17">J</text:span><text:span text:style-name="T10">akiego gniazda </text:span><text:span text:style-name="T18">używa</text:span><text:span text:style-name="T10">? Jakim poleceniem systemowym można sprawdzić jakie gniazda są powiązane z danym procesem?</text:span></text:p>
      <text:p text:style-name="P1"/>
      <text:p text:style-name="P20">8.</text:p>
      <text:list xml:id="list238543454" text:style-name="L1">
        <text:list-item>
          <text:p text:style-name="P28">Ile sztuk obiektów obecnie udostępnia klientom serwer?</text:p>
        </text:list-item>
        <text:list-item>
          <text:p text:style-name="P27">Jak nazywają się te obiekty?</text:p>
          <text:p text:style-name="P30">2 – calc11, calc22</text:p>
        </text:list-item>
        <text:list-item>
          <text:p text:style-name="P27">Ile wpisów zawiera tablica ASM (Active Servant Map) serwera?</text:p>
          <text:p text:style-name="P30">2 – po jednym na <text:span text:style-name="T2">każdego serwanta</text:span></text:p>
        </text:list-item>
        <text:list-item>
          <text:p text:style-name="P29">Jak nazywa się obiekt używany obecnie przez klienta?</text:p>
        </text:list-item>
        <text:list-item>
          <text:p text:style-name="P29">W jaki sposób klient uzyskał referencję do tego konkretnego obiektu (tj. co zawiera referencja)?</text:p>
          <text:p text:style-name="P31"><text:span text:style-name="T3">obj1</text:span> – aplikacja daje 2 możliwości uzyskania referencji do obiektu ObjectPrx – prze<text:span text:style-name="T6">z: konwersję właściwości pliku konfiguracyjnego </text:span><text:span text:style-name="T20">klienta </text:span><text:span text:style-name="T6">do proxy lub konwersję ciągu zanków do proxy. Bez podania początkowych argumentów aplikacja wykorzystuję drugą opcję.</text:span></text:p>
        </text:list-item>
        <text:list-item>
          <text:p text:style-name="P29">Co się stanie jeśli klient zrealizuje wywołanie na obiekcie calc33 (przetestuj)</text:p>
          <text:p text:style-name="P32">Rzucany jest wyjątek com.zeroc.Ice.ObjectNotExistException, ponieważ serwer nie udostępnia takiego obiektu.</text:p>
        </text:list-item>
      </text:list>
      <text:p text:style-name="P21">9. Analiza komunikacji sieciowej. <text:span text:style-name="T16">J</text:span><text:span text:style-name="T10">akie informacje zawiera żądanie, a jakie odpowiedź?</text:span></text:p>
      <text:p text:style-name="P6"/>
      <text:p text:style-name="P16"/>
      <text:p text:style-name="P16">10. Rozproszenie. <text:span text:style-name="T10">Co trzeba zmienić w kodzie/konfiguracji klienta i/lub serwera, by klient mógł się </text:span><text:span text:style-name="T15">\ </text:span><text:span text:style-name="T10">komunikować z serwerem działającym na innej maszynie?</text:span></text:p>
      <text:p text:style-name="P24"><text:span text:style-name="T25">W</text:span><text:span text:style-name="T22"> kodzie klienta </text:span><text:span text:style-name="T25">p</text:span><text:span text:style-name="T21">rzy tworzeniu ObjectPrx</text:span><text:span text:style-name="T22"> </text:span><text:span text:style-name="T21">należy zmienić adres IP proxy z adresu IP loopback (</text:span>127.0.0.2<text:span text:style-name="T21">)</text:span> <text:span text:style-name="T21">na adres IP maszyny, na której działa serwer. </text:span><text:span text:style-name="T22">Adres IP można też zmienić w </text:span><text:span text:style-name="T11">pliku </text:span><text:span text:style-name="T12">konfiguracyjnym</text:span><text:span text:style-name="T11"> </text:span><text:span text:style-name="T12">klienta.</text:span></text:p>
      <text:p text:style-name="P17"/>
      <text:p text:style-name="P17">11. Rozbudowa interfejsu. <text:span text:style-name="T10">Do jakiego typu w języku Java odwzorowuje się sekwencja liczb long?</text:span></text:p>
      <text:p text:style-name="P7"><text:span text:style-name="T25">S</text:span>ekwencja liczb long <text:span text:style-name="T23">w ICE odwzorowuje się do tablicy typów prymitywnych </text:span><text:span text:style-name="T5">long</text:span><text:span text:style-name="T23"> w Javie.</text:span></text:p>
      <text:p text:style-name="P18"/>
      <text:p text:style-name="P18">1<text:span text:style-name="T24">3</text:span>. Wywołania asynchroniczne. <text:span text:style-name="T10">Prześledź działanie istniejących, wzorcowych wywołań add-</text:span></text:p>
      <text:p text:style-name="P8">asyn1 oraz add-asyn2-req i add-asyn2-res. W jakich przypadkach warto w taki sposób</text:p>
      <text:p text:style-name="P8">realizować wywołania zdalne?</text:p>
      <text:p text:style-name="P10">Wywołania asynchroniczne warto stosować gdy odpowiedź serwera zajmuje dużo – gdy wysyła rządanie do zewnętrznego API, bazy danych, zapisuje lub odczytuje pliki.</text:p>
      <text:p text:style-name="P18"/>
      <text:p text:style-name="P18"><text:span text:style-name="T24">14. Pula wątków adaptera.</text:span><text:span text:style-name="T13"> Domyślna wielkość puli wątków adaptera wynosi 1 (spróbuj przetestować, np. uruchamiając kolejną instancję klienta i wywołując długotrwałą operację) – kiedy to może stanowić problem? </text:span></text:p>
      <text:p text:style-name="P19"><text:span text:style-name="T10">Jaką wielkość puli wątków skonfigurowano </text:span><text:span text:style-name="T14">w pliku konfiguracyjnym serwera</text:span><text:span text:style-name="T10">?</text:span></text:p>
      <text:p text:style-name="P22"/>
      <text:p text:style-name="P22">15. Efektywność komunikacji – wywołania oneway.</text:p>
      <text:p text:style-name="P22">Na czym polega wywołanie oneway?</text:p>
      <text:p text:style-name="P23">Na czym polega różnica w komunikacji sieciowej (dialog klienta z serwerem) w stosunku do tradycyjnego wywołania (tj. Twoway)?</text:p>
      <text:p text:style-name="P11">Przy wywołaniach oneway dane przepływają tylko od klienta do serwera, przy wywołaniach twoway dane przepływają też od serwera do klienta. <text:span text:style-name="T26">W pierwszym przypadku komunikacja jest prosta I szybka, ale klient nie wie czy pakiet dotarł, ani nie ma odpowiedzi od serwera, w drugim przypadku serwer przesyła </text:span><text:soft-page-break/><text:span text:style-name="T26">odpowiedź do klienta, ale wiąże się to z bardziej zaawansowaną komunikacją, w której trzeba uwzględnić serializację I deserializację danych czas ich przetwarzania I przesyłania I związane z tym potencjalne błędy.</text:span></text:p>
      <text:p text:style-name="P51"><text:span text:style-name="T19">Jakie są wymogi dla takiej realizacji?</text:span></text:p>
      <text:list xml:id="list1601025847" text:style-name="L3">
        <text:list-item>
          <text:p text:style-name="P52"><text:span text:style-name="T38">Serwer proxy musi obsługiwać taki tryb pracy,</text:span></text:p>
        </text:list-item>
        <text:list-item>
          <text:p text:style-name="P41"><text:span text:style-name="T44">r</text:span>ządania <text:span text:style-name="T45">nie mogą wymagać informacji zwrotnej</text:span> <text:span text:style-name="T45">i</text:span> <text:span text:style-name="T46">muszą być </text:span>niezależne od siebie</text:p>
        </text:list-item>
      </text:list>
      <text:p text:style-name="P9">Które z operacji interfejsu Calculator mogą być tak zrealizowane?</text:p>
      <text:p text:style-name="P12">W ten sposób mogą być realizowane operacje, które nic nie zwracają<text:span text:style-name="T27"> – </text:span><text:span text:style-name="T29">np.</text:span><text:span text:style-name="T27"> </text:span><text:span text:style-name="T28">operacja op</text:span></text:p>
      <text:p text:style-name="P25"><text:span text:style-name="T32">Przy realizacji </text:span><text:span text:style-name="T33">innych </text:span><text:span text:style-name="T32">operacji jest rzucany wyjątek – </text:span><text:span text:style-name="T34">np. operacja add</text:span></text:p>
      <text:p text:style-name="P25"><text:span text:style-name="T39">Efektywność komunikacji – wywołania datagramowe.</text:span><text:span text:style-name="T31"> </text:span></text:p>
      <text:p text:style-name="P33">Na czym polega wywołanie datagram?</text:p>
      <text:p text:style-name="P26"><text:span text:style-name="T31">W</text:span><text:span text:style-name="T30">ywołanie datagram polega na przesyłaniu danych w postaci pakietów </text:span><text:span text:style-name="T35">bez wstępnego ustalenia połączenia z serwerem</text:span><text:span text:style-name="T30">. Pakiet</text:span><text:span text:style-name="T35">y</text:span><text:span text:style-name="T30"> są niezależne od siebie, </text:span><text:span text:style-name="T35">każdy z nich zawiera informacje dotyczące </text:span><text:span text:style-name="T36">odbiorcy, a </text:span><text:span text:style-name="T35">i</text:span><text:span text:style-name="T30">ch dotarcie, czas I kolejność przesyłania nie </text:span><text:span text:style-name="T35">są</text:span><text:span text:style-name="T30"> </text:span><text:span text:style-name="T37">z góry za</text:span><text:span text:style-name="T30">gwarantowan</text:span><text:span text:style-name="T37">e.</text:span></text:p>
      <text:p text:style-name="P33">Jakie są wymogi dla takiej realizacji?</text:p>
      <text:list xml:id="list2327006996" text:style-name="L2">
        <text:list-item>
          <text:p text:style-name="P40"><text:span text:style-name="T44">Serwer proxy musi obsługiwać taki tryb pracy,</text:span></text:p>
        </text:list-item>
        <text:list-item>
          <text:p text:style-name="P40"><text:span text:style-name="T44">r</text:span>ządania <text:span text:style-name="T45">nie mogą wymagać informacji zwrotnej</text:span> <text:span text:style-name="T45">i</text:span> niezależne od siebie</text:p>
        </text:list-item>
        <text:list-item>
          <text:p text:style-name="P43">utrata pakietów I opóźnienie ich przes<text:span text:style-name="T48">y</text:span>łania jest akceptowalne, <text:span text:style-name="T48">a kolejność przesyłania nie jest wymagana</text:span></text:p>
        </text:list-item>
      </text:list>
      <text:p text:style-name="P33">Które z operacji interfejsu Calculator mogą być tak zrealizowane?</text:p>
      <text:p text:style-name="P50">W ten sposób mogą być realizowane operacje, które nic nie zwracają<text:span text:style-name="T27"> – </text:span><text:span text:style-name="T29">np.</text:span><text:span text:style-name="T27"> </text:span><text:span text:style-name="T28">operacja op</text:span></text:p>
      <text:p text:style-name="P35"><text:span text:style-name="T40">Przy realizacji </text:span><text:span text:style-name="T41">innych </text:span><text:span text:style-name="T40">operacji jest rzucany wyjątek – </text:span><text:span text:style-name="T42">np. operacja add</text:span></text:p>
      <text:p text:style-name="P34">Na czym polega różnica w komunikacji sieciowej (dialog klienta z serwerem) w stosunku do tradycyjnego wywołania (tj. Twoway)?</text:p>
      <text:p text:style-name="P34">Efektywność komunikacji – agregacja wywołań. Na czym polega korzyść z agregacji</text:p>
      <text:p text:style-name="P36">wywołań? </text:p>
      <text:p text:style-name="P38">Korzyści z agragacji wywołań to zminiejszenie liczby pakietów I skrócenie czasu ich przesyłania – zamiast przesyłania wielu małych pakietów w wielu rządaniach, przesyła się jeden duż<text:span text:style-name="T43">y</text:span> pakiety w jednym rządaniu. <text:span text:style-name="T43">Dzięki temu zmeniejsza się ilość dodatkowych danych związanych z osobnymi rządaniami I zwiększa przepustowość sieci.</text:span></text:p>
      <text:p text:style-name="P37">Jakie są wymogi dla takiej realizacji?</text:p>
      <text:list xml:id="list12760065483922" text:continue-numbering="true" text:style-name="L2">
        <text:list-item>
          <text:p text:style-name="P39"><text:span text:style-name="T44">Serwer proxy musi obsługiwać taki tryb pracy,</text:span></text:p>
        </text:list-item>
        <text:list-item>
          <text:p text:style-name="P39"><text:span text:style-name="T44">r</text:span>ządania <text:span text:style-name="T45">nie mogą wymagać informacji zwrotnej, </text:span>muszą być proste, powtarzalne <text:span text:style-name="T45">i</text:span> niezależne od siebie</text:p>
        </text:list-item>
        <text:list-item>
          <text:p text:style-name="P43">utrata pakietów I opóźnienie ich przes<text:span text:style-name="T48">y</text:span>łania jest akceptowalne, <text:span text:style-name="T48">a kolejność przesyłania nie jest wymagana</text:span></text:p>
        </text:list-item>
        <text:list-item>
          <text:p text:style-name="P42">zaagregowane <text:span text:style-name="T45">dane</text:span> nie <text:span text:style-name="T45">mogą</text:span> przekraczać dopuszczalnego rozmiaru transferu</text:p>
        </text:list-item>
      </text:list>
      <text:p text:style-name="P44"><text:span text:style-name="T47">Które z operacji interfejsu Calculator mogą być tak zrealizowane? Przetestuj: wywołaj kilku(nasto)krotnie add i op zmieniając wcześniej</text:span></text:p>
      <text:p text:style-name="P34">tryb pracy proxy. Pamiętaj o „przepchaniu” żądań (flush). Na czym polega różnica w</text:p>
      <text:p text:style-name="P34">komunikacji sieciowej (dialog klienta z serwerem) w stosunku do tradycyjnego wywołania</text:p>
      <text:p text:style-name="P34">(tj. twoway)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1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7T12:53:50.424725384</meta:creation-date>
    <dc:date>2026-07-09T01:27:58.967332816</dc:date>
    <meta:editing-duration>PT2H12M17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2" meta:paragraph-count="65" meta:word-count="832" meta:character-count="5865" meta:non-whitespace-character-count="5093"/>
  </office:meta>
</office:document-meta>
</file>